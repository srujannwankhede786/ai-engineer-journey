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2.4126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5866in"/>
    </style:style>
    <style:style style:name="co7" style:family="table-column">
      <style:table-column-properties fo:break-before="auto" style:column-width="2.1in"/>
    </style:style>
    <style:style style:name="co8" style:family="table-column">
      <style:table-column-properties fo:break-before="auto" style:column-width="4.2in"/>
    </style:style>
    <style:style style:name="co9" style:family="table-column">
      <style:table-column-properties fo:break-before="auto" style:column-width="0.752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AI_20_Engineer_20_Tracker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I Engineer Track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number-columns-repeated="1637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Task Type</text:p>
          </table:table-cell>
          <table:table-cell office:value-type="string" calcext:value-type="string">
            <text:p>Notes/Progress</text:p>
          </table:table-cell>
          <table:table-cell table:style-name="ce2" office:value-type="string" calcext:value-type="string">
            <text:p>Resume Skills to Highlight</text:p>
          </table:table-cell>
          <table:table-cell table:style-name="Default" table:number-columns-repeated="16376"/>
        </table:table-row>
        <table:table-row table:style-name="ro2">
          <table:table-cell table:style-name="ce1" office:value-type="string" calcext:value-type="string">
            <text:p>2026-03-23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Python Engineering</text:p>
          </table:table-cell>
          <table:table-cell table:style-name="ce1" office:value-type="string" calcext:value-type="string">
            <text:p>Learn Focus</text:p>
          </table:table-cell>
          <table:table-cell table:style-name="ce1" office:value-type="string" calcext:value-type="string">
            <text:p>Learn</text:p>
          </table:table-cell>
          <table:table-cell table:style-name="ce1"/>
          <table:table-cell table:style-name="ce3" office:value-type="string" calcext:value-type="string">
            <text:p>Python syntax, functions, OOP basics, clean code, error handling</text:p>
          </table:table-cell>
          <table:table-cell table:style-name="Default" table:number-columns-repeated="16376"/>
        </table:table-row>
        <table:table-row table:style-name="ro2">
          <table:table-cell table:style-name="ce1" office:value-type="string" calcext:value-type="string">
            <text:p>2026-03-24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Python Engineering</text:p>
          </table:table-cell>
          <table:table-cell table:style-name="ce1" office:value-type="string" calcext:value-type="string">
            <text:p>Practice Focus</text:p>
          </table:table-cell>
          <table:table-cell table:style-name="ce1" office:value-type="string" calcext:value-type="string">
            <text:p>Practice</text:p>
          </table:table-cell>
          <table:table-cell table:style-name="ce1"/>
          <table:table-cell table:style-name="ce3" office:value-type="string" calcext:value-type="string">
            <text:p>Problem solving, debugging, lists/dicts, modular coding</text:p>
          </table:table-cell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2026-03-25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Python Engineering</text:p>
          </table:table-cell>
          <table:table-cell table:style-name="ce1" office:value-type="string" calcext:value-type="string">
            <text:p>Apply Focus</text:p>
          </table:table-cell>
          <table:table-cell table:style-name="ce1" office:value-type="string" calcext:value-type="string">
            <text:p>Apply</text:p>
          </table:table-cell>
          <table:table-cell table:style-name="ce1"/>
          <table:table-cell table:style-name="ce3" office:value-type="string" calcext:value-type="string">
            <text:p>File handling, JSON/CSV processing, script automation</text:p>
          </table:table-cell>
          <table:table-cell table:style-name="Default" table:number-columns-repeated="16376"/>
        </table:table-row>
        <table:table-row table:style-name="ro2">
          <table:table-cell table:style-name="ce1" office:value-type="string" calcext:value-type="string">
            <text:p>2026-03-26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Day 4</text:p>
          </table:table-cell>
          <table:table-cell table:style-name="ce1" office:value-type="string" calcext:value-type="string">
            <text:p>Python Engineering</text:p>
          </table:table-cell>
          <table:table-cell table:style-name="ce1" office:value-type="string" calcext:value-type="string">
            <text:p>Build Focus</text:p>
          </table:table-cell>
          <table:table-cell table:style-name="ce1" office:value-type="string" calcext:value-type="string">
            <text:p>Build</text:p>
          </table:table-cell>
          <table:table-cell table:style-name="ce1"/>
          <table:table-cell table:style-name="ce3" office:value-type="string" calcext:value-type="string">
            <text:p>Reusable utilities, package structure, logging, testing basics</text:p>
          </table:table-cell>
          <table:table-cell table:style-name="Default" table:number-columns-repeated="16376"/>
        </table:table-row>
        <table:table-row table:style-name="ro2">
          <table:table-cell table:style-name="ce1" office:value-type="string" calcext:value-type="string">
            <text:p>2026-03-27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Python Engineering</text:p>
          </table:table-cell>
          <table:table-cell table:style-name="ce1" office:value-type="string" calcext:value-type="string">
            <text:p>Project Focus</text:p>
          </table:table-cell>
          <table:table-cell table:style-name="ce1" office:value-type="string" calcext:value-type="string">
            <text:p>Project</text:p>
          </table:table-cell>
          <table:table-cell table:style-name="ce1"/>
          <table:table-cell table:style-name="ce3" office:value-type="string" calcext:value-type="string">
            <text:p>Data cleaning automation, CLI tool building, documentation, Git</text:p>
          </table:table-cell>
          <table:table-cell table:style-name="Default" table:number-columns-repeated="16376"/>
        </table:table-row>
        <table:table-row table:style-name="ro2">
          <table:table-cell table:style-name="ce1" office:value-type="string" calcext:value-type="string">
            <text:p>2026-03-28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Day 6</text:p>
          </table:table-cell>
          <table:table-cell table:style-name="ce1" office:value-type="string" calcext:value-type="string">
            <text:p>Python Engineering</text:p>
          </table:table-cell>
          <table:table-cell table:style-name="ce1" office:value-type="string" calcext:value-type="string">
            <text:p>Revise Focus</text:p>
          </table:table-cell>
          <table:table-cell table:style-name="ce1" office:value-type="string" calcext:value-type="string">
            <text:p>Revise</text:p>
          </table:table-cell>
          <table:table-cell table:style-name="ce1"/>
          <table:table-cell table:style-name="ce3" office:value-type="string" calcext:value-type="string">
            <text:p>Code review, interview explanations, note-making, refactoring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3-29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Pandas, NumPy, DataFrames, indexing, data type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3-30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Data cleaning, filtering, joins, groupby, missing-value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3-3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EDA, feature extraction, summary statistics, dataset profi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0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Reusable data pipeline, validation checks, notebook-to-script workflow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4-02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Analytics project, KPI reporting, data storytelling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03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Data manipulation patterns, SQL-like thinking, interview note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04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PySpark DataFrames, Spark architecture, lazy execution, schema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0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Transformations, actions, aggregations, partitioning, join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06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Large-scale ETL, distributed processing, performance awarenes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07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Spark jobs, pipeline modularity, optimization basics, config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08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Batch data pipeline, big-data processing, scalable ETL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09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Spark optimization notes, execution planning, interview explanation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10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Supervised learning, train/test split, metrics, scikit-learn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11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Preprocessing, regression/classification, feature engineer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12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Model training, evaluation, error analysis, baseline comparison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1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Training pipeline, reproducibility, experiment tracking basic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14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End-to-end ML project, model evaluation, explainability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1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Bias-variance, metric selection, model trade-offs, interview not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4-16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HTTP, REST APIs, FastAPI, request/response desig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4-17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Routing, validation, JSON handling, endpoint test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18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Model serving, API integration, environment variables, Postman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19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FastAPI service, Docker basics, app structure, error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0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Deployable inference API, backend integration, documentation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1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API design decisions, architecture explanation, interview note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2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LLMs, embeddings, vector databases, prompt engineering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4-23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Chunking, retrieval, prompt testing, context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4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RAG pipeline, evaluation, latency/cost awareness, ground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LLM app orchestration, caching, observability, guardrail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6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RAG/QA assistant, chatbot workflow, portfolio-ready AI app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7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System design trade-offs, project storytelling, interview note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8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Python Engineering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Python syntax, functions, OOP basics, clean code, error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4-29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Python Engineering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Problem solving, debugging, lists/dicts, modular coding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4-30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Python Engineering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File handling, JSON/CSV processing, script automation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01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Python Engineering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Reusable utilities, package structure, logging, testing basic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02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Python Engineering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Data cleaning automation, CLI tool building, documentation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03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Python Engineering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Code review, interview explanations, note-making, refactoring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5-04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Pandas, NumPy, DataFrames, indexing, data type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05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Data cleaning, filtering, joins, groupby, missing-value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06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EDA, feature extraction, summary statistics, dataset profi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0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Reusable data pipeline, validation checks, notebook-to-script workflow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5-08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Analytics project, KPI reporting, data storytelling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09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Pandas/Data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Data manipulation patterns, SQL-like thinking, interview note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0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PySpark DataFrames, Spark architecture, lazy execution, schema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1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Transformations, actions, aggregations, partitioning, join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2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Large-scale ETL, distributed processing, performance awarenes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3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Spark jobs, pipeline modularity, optimization basics, config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4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Batch data pipeline, big-data processing, scalable ETL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5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Spark optimization notes, execution planning, interview explanation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6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Supervised learning, train/test split, metrics, scikit-learn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7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Preprocessing, regression/classification, feature engineer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8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Model training, evaluation, error analysis, baseline comparison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1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Training pipeline, reproducibility, experiment tracking basic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20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End-to-end ML project, model evaluation, explainability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21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ML Basics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Bias-variance, metric selection, model trade-offs, interview not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5-22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HTTP, REST APIs, FastAPI, request/response desig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5-23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Routing, validation, JSON handling, endpoint test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24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Model serving, API integration, environment variables, Postman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25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FastAPI service, Docker basics, app structure, error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26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Deployable inference API, backend integration, documentation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27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Backend + APIs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API design decisions, architecture explanation, interview note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28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Learn Focus</text:p>
          </table:table-cell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LLMs, embeddings, vector databases, prompt engineering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2026-05-29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Practice Focus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Chunking, retrieval, prompt testing, context handl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30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Apply Focus</text:p>
          </table:table-cell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RAG pipeline, evaluation, latency/cost awareness, grounding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5-3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Build Focus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LLM app orchestration, caching, observability, guardrails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6-0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Project Focus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RAG/QA assistant, chatbot workflow, portfolio-ready AI app, Git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2026-06-02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AI Systems</text:p>
          </table:table-cell>
          <table:table-cell office:value-type="string" calcext:value-type="string">
            <text:p>Revise Focus</text:p>
          </table:table-cell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System design trade-offs, project storytelling, interview notes</text:p>
          </table:table-cell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I_20_Engineer_20_Tracker" style:display-name="PageStyle_AI Engineer Tra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3-22T07:13:34</meta:creation-date>
    <dc:date>2026-03-22T13:12:24.723257802</dc:date>
    <meta:generator>LibreOffice/25.8.5.2$Linux_X86_64 LibreOffice_project/580$Build-2</meta:generator>
    <meta:editing-duration>PT4M31S</meta:editing-duration>
    <meta:editing-cycles>1</meta:editing-cycles>
    <meta:document-statistic meta:table-count="1" meta:cell-count="512" meta:object-count="0"/>
    <meta:user-defined meta:name="AppVersion">3.1</meta:user-defined>
  </office:meta>
</office:document-meta>
</file>